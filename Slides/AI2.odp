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dia/image2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text-transform="uppercase" fo:color="#ec6d6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6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text-transform="uppercase" fo:color="#ec6d6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text-transform="uppercase" fo:color="#ec6d6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5in" style:font-size-asian="0.5in" style:font-size-complex="0.5in" fo:letter-spacing="0.18056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3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833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833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text-transform="uppercase" fo:color="#ec6d6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text-transform="uppercase" fo:color="#ec6d6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3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65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25in" text:min-label-width="0.25in"/>
      </text:list-level-style-number>
      <text:list-level-style-number text:level="3" style:num-format="" style:num-list-format-name="">
        <style:list-level-properties text:space-before="0.55in" text:min-label-width="0.25in"/>
      </text:list-level-style-number>
      <text:list-level-style-number text:level="4" style:num-format="" style:num-list-format-name="">
        <style:list-level-properties text:space-before="0.85in" text:min-label-width="0.25in"/>
      </text:list-level-style-number>
      <text:list-level-style-number text:level="5" style:num-format="" style:num-list-format-name="">
        <style:list-level-properties text:space-before="1.05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471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25in" text:min-label-width="0.25in"/>
      </text:list-level-style-number>
      <text:list-level-style-number text:level="3" style:num-format="" style:num-list-format-name="">
        <style:list-level-properties text:space-before="0.55in" text:min-label-width="0.25in"/>
      </text:list-level-style-number>
      <text:list-level-style-number text:level="4" style:num-format="" style:num-list-format-name="">
        <style:list-level-properties text:space-before="0.85in" text:min-label-width="0.25in"/>
      </text:list-level-style-number>
      <text:list-level-style-number text:level="5" style:num-format="" style:num-list-format-name="">
        <style:list-level-properties text:space-before="1.05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5in"/>
      </text:list-level-style-number>
      <text:list-level-style-number text:level="4" style:num-format="" style:num-list-format-name="">
        <style:list-level-properties text:space-before="0.85in"/>
      </text:list-level-style-number>
      <text:list-level-style-number text:level="5" style:num-format="" style:num-list-format-name="">
        <style:list-level-properties text:space-before="1.0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25in" text:min-label-width="0.25in"/>
      </text:list-level-style-number>
      <text:list-level-style-number text:level="3" style:num-format="" style:num-list-format-name="">
        <style:list-level-properties text:space-before="0.55in" text:min-label-width="0.25in"/>
      </text:list-level-style-number>
      <text:list-level-style-number text:level="4" style:num-format="" style:num-list-format-name="">
        <style:list-level-properties text:space-before="0.85in" text:min-label-width="0.25in"/>
      </text:list-level-style-number>
      <text:list-level-style-number text:level="5" style:num-format="" style:num-list-format-name="">
        <style:list-level-properties text:space-before="1.05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5in"/>
      </text:list-level-style-number>
      <text:list-level-style-number text:level="4" style:num-format="" style:num-list-format-name="">
        <style:list-level-properties text:space-before="0.85in"/>
      </text:list-level-style-number>
      <text:list-level-style-number text:level="5" style:num-format="" style:num-list-format-name="">
        <style:list-level-properties text:space-before="1.0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5in"/>
      </text:list-level-style-number>
      <text:list-level-style-number text:level="4" style:num-format="" style:num-list-format-name="">
        <style:list-level-properties text:space-before="0.85in"/>
      </text:list-level-style-number>
      <text:list-level-style-number text:level="5" style:num-format="" style:num-list-format-name="">
        <style:list-level-properties text:space-before="1.0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2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25in" text:min-label-width="0.25in"/>
      </text:list-level-style-number>
      <text:list-level-style-number text:level="3" style:num-format="" style:num-list-format-name="">
        <style:list-level-properties text:space-before="0.55in" text:min-label-width="0.25in"/>
      </text:list-level-style-number>
      <text:list-level-style-number text:level="4" style:num-format="" style:num-list-format-name="">
        <style:list-level-properties text:space-before="0.85in" text:min-label-width="0.25in"/>
      </text:list-level-style-number>
      <text:list-level-style-number text:level="5" style:num-format="" style:num-list-format-name="">
        <style:list-level-properties text:space-before="1.05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5in"/>
      </text:list-level-style-number>
      <text:list-level-style-number text:level="4" style:num-format="" style:num-list-format-name="">
        <style:list-level-properties text:space-before="0.85in"/>
      </text:list-level-style-number>
      <text:list-level-style-number text:level="5" style:num-format="" style:num-list-format-name="">
        <style:list-level-properties text:space-before="1.0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5in"/>
      </text:list-level-style-number>
      <text:list-level-style-number text:level="4" style:num-format="" style:num-list-format-name="">
        <style:list-level-properties text:space-before="0.85in"/>
      </text:list-level-style-number>
      <text:list-level-style-number text:level="5" style:num-format="" style:num-list-format-name="">
        <style:list-level-properties text:space-before="1.0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8">
      <text:list-level-style-bullet text:level="1" text:bullet-char="Ø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fo:font-size="100%"/>
      </text:list-level-style-bullet>
    </text:list-style>
    <text:list-style style:name="a485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25in" text:min-label-width="0.25in"/>
      </text:list-level-style-number>
      <text:list-level-style-number text:level="3" style:num-format="" style:num-list-format-name="">
        <style:list-level-properties text:space-before="0.55in" text:min-label-width="0.25in"/>
      </text:list-level-style-number>
      <text:list-level-style-number text:level="4" style:num-format="" style:num-list-format-name="">
        <style:list-level-properties text:space-before="0.85in" text:min-label-width="0.25in"/>
      </text:list-level-style-number>
      <text:list-level-style-number text:level="5" style:num-format="" style:num-list-format-name="">
        <style:list-level-properties text:space-before="1.05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479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25in" text:min-label-width="0.25in"/>
      </text:list-level-style-number>
      <text:list-level-style-number text:level="3" style:num-format="" style:num-list-format-name="">
        <style:list-level-properties text:space-before="0.55in" text:min-label-width="0.25in"/>
      </text:list-level-style-number>
      <text:list-level-style-number text:level="4" style:num-format="" style:num-list-format-name="">
        <style:list-level-properties text:space-before="0.85in" text:min-label-width="0.25in"/>
      </text:list-level-style-number>
      <text:list-level-style-number text:level="5" style:num-format="" style:num-list-format-name="">
        <style:list-level-properties text:space-before="1.05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416">
      <text:list-level-style-bullet text:level="1" text:bullet-char="Ø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fo:font-size="100%"/>
      </text:list-level-style-bullet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5in"/>
      </text:list-level-style-number>
      <text:list-level-style-number text:level="4" style:num-format="" style:num-list-format-name="">
        <style:list-level-properties text:space-before="0.85in"/>
      </text:list-level-style-number>
      <text:list-level-style-number text:level="5" style:num-format="" style:num-list-format-name="">
        <style:list-level-properties text:space-before="1.0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25in" text:min-label-width="0.25in"/>
      </text:list-level-style-number>
      <text:list-level-style-number text:level="3" style:num-format="" style:num-list-format-name="">
        <style:list-level-properties text:space-before="0.55in" text:min-label-width="0.25in"/>
      </text:list-level-style-number>
      <text:list-level-style-number text:level="4" style:num-format="" style:num-list-format-name="">
        <style:list-level-properties text:space-before="0.85in" text:min-label-width="0.25in"/>
      </text:list-level-style-number>
      <text:list-level-style-number text:level="5" style:num-format="" style:num-list-format-name="">
        <style:list-level-properties text:space-before="1.05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489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25in" text:min-label-width="0.25in"/>
      </text:list-level-style-number>
      <text:list-level-style-number text:level="3" style:num-format="" style:num-list-format-name="">
        <style:list-level-properties text:space-before="0.55in" text:min-label-width="0.25in"/>
      </text:list-level-style-number>
      <text:list-level-style-number text:level="4" style:num-format="" style:num-list-format-name="">
        <style:list-level-properties text:space-before="0.85in" text:min-label-width="0.25in"/>
      </text:list-level-style-number>
      <text:list-level-style-number text:level="5" style:num-format="" style:num-list-format-name="">
        <style:list-level-properties text:space-before="1.05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499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25in" text:min-label-width="0.25in"/>
      </text:list-level-style-number>
      <text:list-level-style-number text:level="3" style:num-format="" style:num-list-format-name="">
        <style:list-level-properties text:space-before="0.55in" text:min-label-width="0.25in"/>
      </text:list-level-style-number>
      <text:list-level-style-number text:level="4" style:num-format="" style:num-list-format-name="">
        <style:list-level-properties text:space-before="0.85in" text:min-label-width="0.25in"/>
      </text:list-level-style-number>
      <text:list-level-style-number text:level="5" style:num-format="" style:num-list-format-name="">
        <style:list-level-properties text:space-before="1.05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5in"/>
      </text:list-level-style-number>
      <text:list-level-style-number text:level="4" style:num-format="" style:num-list-format-name="">
        <style:list-level-properties text:space-before="0.85in"/>
      </text:list-level-style-number>
      <text:list-level-style-number text:level="5" style:num-format="" style:num-list-format-name="">
        <style:list-level-properties text:space-before="1.0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25in" text:min-label-width="0.25in"/>
      </text:list-level-style-number>
      <text:list-level-style-number text:level="3" style:num-format="" style:num-list-format-name="">
        <style:list-level-properties text:space-before="0.55in" text:min-label-width="0.25in"/>
      </text:list-level-style-number>
      <text:list-level-style-number text:level="4" style:num-format="" style:num-list-format-name="">
        <style:list-level-properties text:space-before="0.85in" text:min-label-width="0.25in"/>
      </text:list-level-style-number>
      <text:list-level-style-number text:level="5" style:num-format="" style:num-list-format-name="">
        <style:list-level-properties text:space-before="1.05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505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25in" text:min-label-width="0.25in"/>
      </text:list-level-style-number>
      <text:list-level-style-number text:level="3" style:num-format="" style:num-list-format-name="">
        <style:list-level-properties text:space-before="0.55in" text:min-label-width="0.25in"/>
      </text:list-level-style-number>
      <text:list-level-style-number text:level="4" style:num-format="" style:num-list-format-name="">
        <style:list-level-properties text:space-before="0.85in" text:min-label-width="0.25in"/>
      </text:list-level-style-number>
      <text:list-level-style-number text:level="5" style:num-format="" style:num-list-format-name="">
        <style:list-level-properties text:space-before="1.05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508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25in" text:min-label-width="0.25in"/>
      </text:list-level-style-number>
      <text:list-level-style-number text:level="3" style:num-format="" style:num-list-format-name="">
        <style:list-level-properties text:space-before="0.55in" text:min-label-width="0.25in"/>
      </text:list-level-style-number>
      <text:list-level-style-number text:level="4" style:num-format="" style:num-list-format-name="">
        <style:list-level-properties text:space-before="0.85in" text:min-label-width="0.25in"/>
      </text:list-level-style-number>
      <text:list-level-style-number text:level="5" style:num-format="" style:num-list-format-name="">
        <style:list-level-properties text:space-before="1.05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number:date-style xmlns:number="urn:oasis:names:tc:opendocument:xmlns:datastyle:1.0" style:name="a5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372" draw:master-page-name="Master1-Layout1-title-Title-Slide" presentation:presentation-page-layout-name="Master1-PPL1" draw:id="Slide-256">
        <draw:frame draw:id="id76" presentation:style-name="a375" draw:name="Tytuł 1" svg:x="0.95912in" svg:y="1.25888in" svg:width="12.2327in" svg:height="1.80923in" presentation:class="title" presentation:placeholder="false">
          <draw:text-box>
            <text:p text:style-name="a374" text:class-names="" text:cond-style-name=""><text:span text:style-name="a373" text:class-names="">Domestic Service Robot<text:line-break/>Sensing and Inspection Requirements</text:span></text:p>
          </draw:text-box>
          <svg:title/>
          <svg:desc/>
        </draw:frame>
        <draw:frame draw:id="id77" presentation:style-name="a379" draw:name="Podtytuł 2" svg:x="7.7044in" svg:y="6.86377in" svg:width="10in" svg:height="1.81076in" presentation:class="subtitle" presentation:placeholder="false">
          <draw:text-box>
            <text:p text:style-name="a378" text:class-names="" text:cond-style-name=""><text:span text:style-name="a376" text:class-names="">Author: Dorian Neumann <text:line-break/></text:span><text:span text:style-name="a377" text:class-names=""/></text:p>
          </draw:text-box>
          <svg:title/>
          <svg:desc/>
        </draw:frame>
      </draw:page>
      <draw:page draw:name="Slide3" draw:style-name="a380" draw:master-page-name="Master1-Layout2-obj-Title-and-Content" presentation:presentation-page-layout-name="Master1-PPL2" draw:id="Slide-258">
        <draw:frame draw:id="id78" presentation:style-name="a383" draw:name="Title 1" svg:x="0.99852in" svg:y="-0.37587in" svg:width="11.32728in" svg:height="1.57311in" presentation:class="title" presentation:placeholder="false">
          <draw:text-box>
            <text:p text:style-name="a382" text:class-names="" text:cond-style-name=""><text:span text:style-name="a381" text:class-names="">Overview</text:span></text:p>
          </draw:text-box>
          <svg:title/>
          <svg:desc/>
        </draw:frame>
        <draw:frame draw:id="id79" presentation:style-name="a388" draw:name="Date Placeholder 3" svg:x="0.86944in" svg:y="6.93574in" svg:width="3in" svg:height="0.39931in" presentation:class="date-time" presentation:placeholder="false">
          <draw:text-box>
            <text:p text:style-name="a387" text:class-names="" text:cond-style-name=""><text:span text:style-name="a384" text:class-names=""><text:date text:fixed="false" style:data-style-name="a385">6/15/2026</text:date></text:span><text:span text:style-name="a386" text:class-names=""/></text:p>
          </draw:text-box>
          <svg:title/>
          <svg:desc/>
        </draw:frame>
        <draw:frame draw:id="id80" presentation:style-name="a391" draw:name="Footer Placeholder 4" svg:x="8.41667in" svg:y="6.93574in" svg:width="3.79498in" svg:height="0.39931in" presentation:class="footer" presentation:placeholder="false">
          <draw:text-box>
            <text:p text:style-name="a390" text:class-names="" text:cond-style-name=""><text:span text:style-name="a389" text:class-names="">
 <text:s text:c="13"/></text:span></text:p>
          </draw:text-box>
          <svg:title/>
          <svg:desc/>
        </draw:frame>
        <draw:frame draw:id="id81" presentation:style-name="a395" draw:name="Slide Number Placeholder 5" svg:x="12.21165in" svg:y="6.93574in" svg:width="0.57549in" svg:height="0.39931in" presentation:class="page-number" presentation:placeholder="false">
          <draw:text-box>
            <text:p text:style-name="a394" text:class-names="" text:cond-style-name=""><text:span text:style-name="a392" text:class-names=""><text:page-number style:num-format="1" text:fixed="false">2</text:page-number></text:span><text:span text:style-name="a393" text:class-names=""/></text:p>
          </draw:text-box>
          <svg:title/>
          <svg:desc/>
        </draw:frame>
        <draw:frame draw:id="id82" draw:style-name="a396" draw:name="Picture 6" svg:x="6.33971in" svg:y="2.62814in" svg:width="6.10537in" svg:height="3.42059in" style:rel-width="scale" style:rel-height="scale">
          <draw:image xlink:href="media/image1.jpeg" xlink:type="simple" xlink:show="embed" xlink:actuate="onLoad"/>
          <svg:title/>
          <svg:desc/>
        </draw:frame>
        <draw:frame draw:id="id83" draw:style-name="a400" draw:name="TextBox 8" svg:x="0.87913in" svg:y="1.34871in" svg:width="11.56276in" svg:height="0.77415in">
          <draw:text-box>
            <text:p text:style-name="a399" text:class-names="" text:cond-style-name=""><text:span text:style-name="a397" text:class-names="">Objective:<text:s text:c="1"/></text:span><text:span text:style-name="a398" text:class-names="">The robot must prepare a smoothie, but the state of some ingredients is unknown . The robot must inspect ingredients before use.<text:s text:c="1"/></text:span></text:p>
          </draw:text-box>
          <svg:title/>
          <svg:desc/>
        </draw:frame>
        <draw:frame draw:id="id84" draw:style-name="a420" draw:name="TextBox 2" svg:x="0.95902in" svg:y="2.62794in" svg:width="4.7437in" svg:height="3.19759in">
          <draw:text-box>
            <text:p text:style-name="a402" text:class-names="" text:cond-style-name=""><text:span text:style-name="a401" text:class-names="">Main requirements:<text:line-break/></text:span></text:p>
            <text:p text:style-name="a405" text:class-names="" text:cond-style-name=""><text:span text:style-name="a403" text:class-names="">🔶</text:span><text:span text:style-name="a404" text:class-names=""> Uncertainty – Freshness status is initially unknown for the robot.</text:span></text:p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  <text:p text:style-name="a413" text:class-names="" text:cond-style-name=""><text:span text:style-name="a409" text:class-names="">🔶<text:s text:c="1"/></text:span><text:span text:style-name="a410" text:class-names="">Sensing – Inspection actions (Vision +<text:s text:c="1"/></text:span><text:span text:style-name="a411" text:class-names="">eNose</text:span><text:span text:style-name="a412" text:class-names="">) updates robot's knowledge.</text:span></text:p>
            <text:list text:style-name="a416">
              <text:list-item>
                <text:p text:style-name="a415" text:class-names="" text:cond-style-name=""><text:span text:style-name="a414" text:class-names=""/></text:p>
              </text:list-item>
            </text:list>
            <text:p text:style-name="a419" text:class-names="" text:cond-style-name=""><text:span text:style-name="a417" text:class-names="">🔶</text:span><text:span text:style-name="a418" text:class-names=""> Dynamics – The food spoils over time (PDDL+)</text:span></text:p>
          </draw:text-box>
          <svg:title/>
          <svg:desc/>
        </draw:frame>
      </draw:page>
      <draw:page draw:name="Slide4" draw:style-name="a421" draw:master-page-name="Master1-Layout2-obj-Title-and-Content" presentation:presentation-page-layout-name="Master1-PPL2" draw:id="Slide-259">
        <draw:frame draw:id="id85" presentation:style-name="a426" draw:name="Title 1" svg:x="0.86864in" svg:y="0.00622in" svg:width="11.32728in" svg:height="1.57311in" presentation:class="title" presentation:placeholder="false">
          <draw:text-box>
            <text:p text:style-name="a425" text:class-names="" text:cond-style-name=""><text:span text:style-name="a422" text:class-names="">Pddl</text:span><text:span text:style-name="a423" text:class-names=""><text:s text:c="1"/>Design choices</text:span><text:span text:style-name="a424" text:class-names=""/></text:p>
          </draw:text-box>
          <svg:title/>
          <svg:desc/>
        </draw:frame>
        <draw:frame draw:id="id86" presentation:style-name="a430" draw:name="Content Placeholder 2" svg:x="0.86864in" svg:y="1.73663in" svg:width="11.343in" svg:height="1.05661in" presentation:class="outline" presentation:placeholder="false">
          <draw:text-box>
            <text:list text:style-name="a429">
              <text:list-item>
                <text:p text:style-name="a428" text:class-names="" text:cond-style-name=""><text:span text:style-name="a427" text:class-names="">Uncertainty was modelled in classical PDDL by distinguishing reality from the robot's knowledge state by given predicates:</text:span></text:p>
              </text:list-item>
            </text:list>
          </draw:text-box>
          <svg:title/>
          <svg:desc/>
        </draw:frame>
        <draw:frame draw:id="id87" presentation:style-name="a435" draw:name="Date Placeholder 3" svg:x="0.86944in" svg:y="6.93574in" svg:width="3in" svg:height="0.39931in" presentation:class="date-time" presentation:placeholder="false">
          <draw:text-box>
            <text:p text:style-name="a434" text:class-names="" text:cond-style-name=""><text:span text:style-name="a431" text:class-names=""><text:date text:fixed="false" style:data-style-name="a432">6/15/2026</text:date></text:span><text:span text:style-name="a433" text:class-names=""/></text:p>
          </draw:text-box>
          <svg:title/>
          <svg:desc/>
        </draw:frame>
        <draw:frame draw:id="id88" presentation:style-name="a438" draw:name="Footer Placeholder 4" svg:x="8.41667in" svg:y="6.93574in" svg:width="3.79498in" svg:height="0.39931in" presentation:class="footer" presentation:placeholder="false">
          <draw:text-box>
            <text:p text:style-name="a437" text:class-names="" text:cond-style-name=""><text:span text:style-name="a436" text:class-names="">
 <text:s text:c="13"/></text:span></text:p>
          </draw:text-box>
          <svg:title/>
          <svg:desc/>
        </draw:frame>
        <draw:frame draw:id="id89" presentation:style-name="a442" draw:name="Slide Number Placeholder 5" svg:x="12.21165in" svg:y="6.93574in" svg:width="0.57549in" svg:height="0.39931in" presentation:class="page-number" presentation:placeholder="false">
          <draw:text-box>
            <text:p text:style-name="a441" text:class-names="" text:cond-style-name=""><text:span text:style-name="a439" text:class-names=""><text:page-number style:num-format="1" text:fixed="false">3</text:page-number></text:span><text:span text:style-name="a440" text:class-names=""/></text:p>
          </draw:text-box>
          <svg:title/>
          <svg:desc/>
        </draw:frame>
        <draw:frame draw:id="id90" draw:style-name="a455" draw:name="TextBox 6" svg:x="3.52581in" svg:y="3.39175in" svg:width="6.25054in" svg:height="1.91855in">
          <draw:text-box>
            <text:p text:style-name="a446" text:class-names="" text:cond-style-name=""><text:span text:style-name="a443" text:class-names="">🔶  is-fresh (?</text:span><text:span text:style-name="a444" text:class-names="">i</text:span><text:span text:style-name="a445" text:class-names="">) – physical state of an ingredient</text:span></text:p>
            <text:p text:style-name="a448" text:class-names="" text:cond-style-name=""><text:span text:style-name="a447" text:class-names=""/></text:p>
            <text:p text:style-name="a450" text:class-names="" text:cond-style-name=""><text:span text:style-name="a449" text:class-names="">🔶  inspected (?I) - knowledge flag </text:span></text:p>
            <text:p text:style-name="a452" text:class-names="" text:cond-style-name=""><text:span text:style-name="a451" text:class-names=""/></text:p>
            <text:p text:style-name="a454" text:class-names="" text:cond-style-name=""><text:span text:style-name="a453" text:class-names="">Every sensing action has a high cost of 3 or 4 cost points forcing the robot to minimize sensing.</text:span></text:p>
          </draw:text-box>
          <svg:title/>
          <svg:desc/>
        </draw:frame>
      </draw:page>
      <draw:page draw:name="Slide5" draw:style-name="a456" draw:master-page-name="Master1-Layout2-obj-Title-and-Content" presentation:presentation-page-layout-name="Master1-PPL2" draw:id="Slide-260">
        <draw:frame draw:id="id91" presentation:style-name="a460" draw:name="Title 1" svg:x="0.88436in" svg:y="0.00622in" svg:width="11.32728in" svg:height="1.57311in" presentation:class="title" presentation:placeholder="false">
          <draw:text-box>
            <text:p text:style-name="a459" text:class-names="" text:cond-style-name=""><text:span text:style-name="a457" text:class-names="">PDDL+ Design choices</text:span><text:span text:style-name="a458" text:class-names=""/></text:p>
          </draw:text-box>
          <svg:title/>
          <svg:desc/>
        </draw:frame>
        <draw:frame draw:id="id92" presentation:style-name="a509" draw:name="Content Placeholder 2" svg:x="0.88436in" svg:y="2.20833in" svg:width="11.32728in" svg:height="4.5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1" text:class-names="">Dynamics in PDDL+ was modelled by using three numeric<text:s text:c="1"/></text:span><text:span text:style-name="a462" text:class-names="">fluents</text:span><text:span text:style-name="a463" text:class-names="">:</text:span></text:p>
              </text:list-item>
            </text:list>
            <text:list text:style-name="a471">
              <text:list-item>
                <text:p text:style-name="a470" text:class-names="" text:cond-style-name=""><text:span text:style-name="a466" text:class-names="">🔶  (spoilage-level ?</text:span><text:span text:style-name="a467" text:class-names="">i</text:span><text:span text:style-name="a468" text:class-names=""><text:s text:c="1"/>- ingredient) - tracks the continuous degradation of the ingredient;</text:span><text:span text:style-name="a469" text:class-names=""/></text:p>
              </text:list-item>
            </text:list>
            <text:list text:style-name="a475">
              <text:list-item>
                <text:p text:style-name="a474" text:class-names="" text:cond-style-name=""><text:span text:style-name="a472" text:class-names="">🔶  (action-timer ?r - robot) - measures the elapsed time of a current task;</text:span><text:span text:style-name="a473" text:class-names=""/></text:p>
              </text:list-item>
            </text:list>
            <text:list text:style-name="a479">
              <text:list-item>
                <text:p text:style-name="a478" text:class-names="" text:cond-style-name=""><text:span text:style-name="a476" text:class-names="">🔶  (total-cost) - metric that helps planner to find well-optimized plan.</text:span><text:span text:style-name="a477" text:class-names=""/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To ensure correct physical modelling, two main processes and events were used:</text:span></text:p>
              </text:list-item>
            </text:list>
            <text:list text:style-name="a489">
              <text:list-item>
                <text:p text:style-name="a488" text:class-names="" text:cond-style-name=""><text:span text:style-name="a486" text:class-names="">🔶  spoilage-fridge – slowly increases food spoilage in the fridge (process)</text:span><text:span text:style-name="a487" text:class-names=""/></text:p>
              </text:list-item>
            </text:list>
            <text:list text:style-name="a493">
              <text:list-item>
                <text:p text:style-name="a492" text:class-names="" text:cond-style-name=""><text:span text:style-name="a490" text:class-names="">🔶  spoilage-outside – increases food spoilage outside the fridge (process)</text:span><text:span text:style-name="a491" text:class-names=""/></text:p>
              </text:list-item>
            </text:list>
            <text:list text:style-name="a499">
              <text:list-item>
                <text:p text:style-name="a498" text:class-names="" text:cond-style-name=""><text:span text:style-name="a494" text:class-names="">🔶  food-spoils – changes food state to<text:s text:c="1"/></text:span><text:span text:style-name="a495" text:class-names="">unfresh</text:span><text:span text:style-name="a496" text:class-names=""><text:s text:c="1"/>if spoilage value exceeds the predefined limit.</text:span><text:span text:style-name="a497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  <draw:frame draw:id="id93" presentation:style-name="a514" draw:name="Date Placeholder 3" svg:x="0.86944in" svg:y="6.93574in" svg:width="3in" svg:height="0.39931in" presentation:class="date-time" presentation:placeholder="false">
          <draw:text-box>
            <text:p text:style-name="a513" text:class-names="" text:cond-style-name=""><text:span text:style-name="a510" text:class-names=""><text:date text:fixed="false" style:data-style-name="a511">6/15/2026</text:date></text:span><text:span text:style-name="a512" text:class-names=""/></text:p>
          </draw:text-box>
          <svg:title/>
          <svg:desc/>
        </draw:frame>
        <draw:frame draw:id="id94" presentation:style-name="a517" draw:name="Footer Placeholder 4" svg:x="8.41667in" svg:y="6.93574in" svg:width="3.79498in" svg:height="0.39931in" presentation:class="footer" presentation:placeholder="false">
          <draw:text-box>
            <text:p text:style-name="a516" text:class-names="" text:cond-style-name=""><text:span text:style-name="a515" text:class-names="">
 <text:s text:c="13"/></text:span></text:p>
          </draw:text-box>
          <svg:title/>
          <svg:desc/>
        </draw:frame>
        <draw:frame draw:id="id95" presentation:style-name="a521" draw:name="Slide Number Placeholder 5" svg:x="12.21165in" svg:y="6.93574in" svg:width="0.57549in" svg:height="0.39931in" presentation:class="page-number" presentation:placeholder="false">
          <draw:text-box>
            <text:p text:style-name="a520" text:class-names="" text:cond-style-name=""><text:span text:style-name="a518" text:class-names=""><text:page-number style:num-format="1" text:fixed="false">5</text:page-number></text:span><text:span text:style-name="a519" text:class-names=""/></text:p>
          </draw:text-box>
          <svg:title/>
          <svg:desc/>
        </draw:frame>
      </draw:page>
      <draw:page draw:name="Slide8" draw:style-name="a522" draw:master-page-name="Master1-Layout2-obj-Title-and-Content" presentation:presentation-page-layout-name="Master1-PPL2" draw:id="Slide-263">
        <draw:frame draw:id="id96" presentation:style-name="a526" draw:name="Title 1" svg:x="0.88436in" svg:y="0.00622in" svg:width="11.32728in" svg:height="1.57311in" presentation:class="title" presentation:placeholder="false">
          <draw:text-box>
            <text:p text:style-name="a525" text:class-names="" text:cond-style-name=""><text:span text:style-name="a523" text:class-names="">REFLECTION</text:span><text:span text:style-name="a524" text:class-names=""/></text:p>
          </draw:text-box>
          <svg:title/>
          <svg:desc/>
        </draw:frame>
        <draw:frame draw:id="id97" presentation:style-name="a548" draw:name="Content Placeholder 2" svg:x="2.61289in" svg:y="1.71052in" svg:width="6.91287in" svg:height="2.3265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Main challenges:</text:span></text:p>
              </text:list-item>
            </text:list>
            <text:list text:style-name="a533">
              <text:list-item>
                <text:p text:style-name="a532" text:class-names="" text:cond-style-name=""><text:span text:style-name="a530" text:class-names="">🔶  Modelling PDDL+ time to fit into ENHSP planner;</text:span><text:span text:style-name="a531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34" text:class-names="">🔶  Handling complexity of calculation in continuous time;</text:span><text:span text:style-name="a535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8" text:class-names="">🔶  Forcing the robot to execute tasks in shorter time.</text:span><text:span text:style-name="a539" text:class-names=""/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  <draw:frame draw:id="id98" presentation:style-name="a553" draw:name="Date Placeholder 3" svg:x="0.86944in" svg:y="6.93574in" svg:width="3in" svg:height="0.39931in" presentation:class="date-time" presentation:placeholder="false">
          <draw:text-box>
            <text:p text:style-name="a552" text:class-names="" text:cond-style-name=""><text:span text:style-name="a549" text:class-names=""><text:date text:fixed="false" style:data-style-name="a550">6/15/2026</text:date></text:span><text:span text:style-name="a551" text:class-names=""/></text:p>
          </draw:text-box>
          <svg:title/>
          <svg:desc/>
        </draw:frame>
        <draw:frame draw:id="id99" presentation:style-name="a556" draw:name="Footer Placeholder 4" svg:x="8.41667in" svg:y="6.93574in" svg:width="3.79498in" svg:height="0.39931in" presentation:class="footer" presentation:placeholder="false">
          <draw:text-box>
            <text:p text:style-name="a555" text:class-names="" text:cond-style-name=""><text:span text:style-name="a554" text:class-names="">
 <text:s text:c="13"/></text:span></text:p>
          </draw:text-box>
          <svg:title/>
          <svg:desc/>
        </draw:frame>
        <draw:frame draw:id="id100" presentation:style-name="a560" draw:name="Slide Number Placeholder 5" svg:x="12.21165in" svg:y="6.93574in" svg:width="0.57549in" svg:height="0.39931in" presentation:class="page-number" presentation:placeholder="false">
          <draw:text-box>
            <text:p text:style-name="a559" text:class-names="" text:cond-style-name=""><text:span text:style-name="a557" text:class-names=""><text:page-number style:num-format="1" text:fixed="false">7</text:page-number></text:span><text:span text:style-name="a558" text:class-names=""/></text:p>
          </draw:text-box>
          <svg:title/>
          <svg:desc/>
        </draw:frame>
        <draw:frame draw:id="id101" draw:style-name="a567" draw:name="TextBox 6" svg:x="0.60249in" svg:y="4.61674in" svg:width="5.46913in" svg:height="1.52587in">
          <draw:text-box>
            <text:p text:style-name="a562" text:class-names="" text:cond-style-name=""><text:span text:style-name="a561" text:class-names="">What would I do differently:</text:span></text:p>
            <text:p text:style-name="a564" text:class-names="" text:cond-style-name=""><text:span text:style-name="a563" text:class-names="">🔶   Easier, not overly complicated domain</text:span></text:p>
            <text:p text:style-name="a566" text:class-names="" text:cond-style-name=""><text:span text:style-name="a565" text:class-names="">🔶  Less complex differential equations</text:span></text:p>
          </draw:text-box>
          <svg:title/>
          <svg:desc/>
        </draw:frame>
        <draw:frame draw:id="id102" draw:style-name="a578" draw:name="TextBox 7" svg:x="6.91593in" svg:y="4.61701in" svg:width="5.07782in" svg:height="2.309in">
          <draw:text-box>
            <text:p text:style-name="a569" text:class-names="" text:cond-style-name=""><text:span text:style-name="a568" text:class-names="">Limitations:</text:span></text:p>
            <text:p text:style-name="a571" text:class-names="" text:cond-style-name=""><text:span text:style-name="a570" text:class-names="">🔶  God-like Knowledge Paradox</text:span></text:p>
            <text:p text:style-name="a573" text:class-names="" text:cond-style-name=""><text:span text:style-name="a572" text:class-names="">🔶  Precision vs Efficiency</text:span></text:p>
            <text:p text:style-name="a575" text:class-names="" text:cond-style-name=""><text:span text:style-name="a574" text:class-names="">🔶  Goal-Oriented Constrains Limitation</text:span></text:p>
            <text:p text:style-name="a577" text:class-names="" text:cond-style-name=""><text:span text:style-name="a57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75in" svg:y="1.38in" svg:width="8.35326in" svg:height="3.12in"/>
      <presentation:placeholder presentation:object="subtitle" svg:x="1.75in" svg:y="5.12in" svg:width="8.35326in" svg:height="1.01629in"/>
      <presentation:placeholder presentation:object="date-time" svg:x="0.86944in" svg:y="6.93574in" svg:width="3in" svg:height="0.39931in"/>
      <presentation:placeholder presentation:object="footer" svg:x="8.41667in" svg:y="6.93574in" svg:width="3.79498in" svg:height="0.39931in"/>
      <presentation:placeholder presentation:object="page-number" svg:x="12.21165in" svg:y="6.93574in" svg:width="0.57549in" svg:height="0.39931in"/>
    </style:presentation-page-layout>
    <style:presentation-page-layout style:name="Master1-PPL2" style:display-name="Title and Content">
      <presentation:placeholder presentation:object="title" svg:x="0.88436in" svg:y="0.39931in" svg:width="11.32728in" svg:height="1.57311in"/>
      <presentation:placeholder presentation:object="object" svg:x="0.88436in" svg:y="2.20833in" svg:width="11.32728in" svg:height="4.5in"/>
      <presentation:placeholder presentation:object="date-time" svg:x="0.86944in" svg:y="6.93574in" svg:width="3in" svg:height="0.39931in"/>
      <presentation:placeholder presentation:object="footer" svg:x="8.41667in" svg:y="6.93574in" svg:width="3.79498in" svg:height="0.39931in"/>
      <presentation:placeholder presentation:object="page-number" svg:x="12.21165in" svg:y="6.93574in" svg:width="0.57549in" svg:height="0.39931in"/>
    </style:presentation-page-layout>
    <style:presentation-page-layout style:name="Master1-PPL3" style:display-name="Section Header">
      <presentation:placeholder presentation:object="title" svg:x="3.9908in" svg:y="1.86979in" svg:width="5.35172in" svg:height="2.79297in"/>
      <presentation:placeholder presentation:object="outline" svg:x="4.44253in" svg:y="4.96552in" svg:width="4.44828in" svg:height="1.26207in"/>
      <presentation:placeholder presentation:object="date-time" svg:x="0.86944in" svg:y="6.93574in" svg:width="3in" svg:height="0.39931in"/>
      <presentation:placeholder presentation:object="footer" svg:x="8.41667in" svg:y="6.93574in" svg:width="3.79498in" svg:height="0.39931in"/>
      <presentation:placeholder presentation:object="page-number" svg:x="12.21165in" svg:y="6.93574in" svg:width="0.57549in" svg:height="0.39931in"/>
    </style:presentation-page-layout>
    <style:presentation-page-layout style:name="Master1-PPL4" style:display-name="Two Content">
      <presentation:placeholder presentation:object="title" svg:x="0.88436in" svg:y="0.39931in" svg:width="11.32728in" svg:height="1.57311in"/>
      <presentation:placeholder presentation:object="object" svg:x="0.88908in" svg:y="2.20833in" svg:width="5.46262in" svg:height="4.54688in"/>
      <presentation:placeholder presentation:object="object" svg:x="6.88289in" svg:y="2.20833in" svg:width="5.49864in" svg:height="4.54688in"/>
      <presentation:placeholder presentation:object="date-time" svg:x="0.86944in" svg:y="6.93574in" svg:width="3in" svg:height="0.39931in"/>
      <presentation:placeholder presentation:object="footer" svg:x="8.41667in" svg:y="6.93574in" svg:width="3.79498in" svg:height="0.39931in"/>
      <presentation:placeholder presentation:object="page-number" svg:x="12.21165in" svg:y="6.93574in" svg:width="0.57549in" svg:height="0.39931in"/>
    </style:presentation-page-layout>
    <style:presentation-page-layout style:name="Master1-PPL5" style:display-name="Comparison">
      <presentation:placeholder presentation:object="title" svg:x="0.88742in" svg:y="0.40373in" svg:width="11.43781in" svg:height="1.5746in"/>
      <presentation:placeholder presentation:object="outline" svg:x="0.875in" svg:y="2.0156in" svg:width="5.4767in" svg:height="0.72398in"/>
      <presentation:placeholder presentation:object="object" svg:x="0.875in" svg:y="2.73958in" svg:width="5.4767in" svg:height="4.02951in"/>
      <presentation:placeholder presentation:object="outline" svg:x="6.86358in" svg:y="2.0156in" svg:width="5.46164in" svg:height="0.72398in"/>
      <presentation:placeholder presentation:object="object" svg:x="6.86358in" svg:y="2.73958in" svg:width="5.46164in" svg:height="4.02951in"/>
      <presentation:placeholder presentation:object="date-time" svg:x="0.86944in" svg:y="6.93574in" svg:width="3in" svg:height="0.39931in"/>
      <presentation:placeholder presentation:object="footer" svg:x="8.41667in" svg:y="6.93574in" svg:width="3.79498in" svg:height="0.39931in"/>
      <presentation:placeholder presentation:object="page-number" svg:x="12.21165in" svg:y="6.93574in" svg:width="0.57549in" svg:height="0.39931in"/>
    </style:presentation-page-layout>
    <style:presentation-page-layout style:name="Master1-PPL6" style:display-name="Title Only">
      <presentation:placeholder presentation:object="title" svg:x="0.875in" svg:y="1.07586in" svg:width="11.03977in" svg:height="1.29109in"/>
      <presentation:placeholder presentation:object="date-time" svg:x="0.86944in" svg:y="6.93574in" svg:width="3in" svg:height="0.39931in"/>
      <presentation:placeholder presentation:object="footer" svg:x="8.41667in" svg:y="6.93574in" svg:width="3.79498in" svg:height="0.39931in"/>
      <presentation:placeholder presentation:object="page-number" svg:x="12.21165in" svg:y="6.93574in" svg:width="0.57549in" svg:height="0.39931in"/>
    </style:presentation-page-layout>
    <style:presentation-page-layout style:name="Master1-PPL7" style:display-name="Blank">
      <presentation:placeholder presentation:object="date-time" svg:x="0.86944in" svg:y="6.93574in" svg:width="3in" svg:height="0.39931in"/>
      <presentation:placeholder presentation:object="footer" svg:x="8.41667in" svg:y="6.93574in" svg:width="3.79498in" svg:height="0.39931in"/>
      <presentation:placeholder presentation:object="page-number" svg:x="12.21165in" svg:y="6.93574in" svg:width="0.57549in" svg:height="0.39931in"/>
    </style:presentation-page-layout>
    <style:presentation-page-layout style:name="Master1-PPL8" style:display-name="Content with Caption">
      <presentation:placeholder presentation:object="title" svg:x="0.9184in" svg:y="1.07986in" svg:width="4.30035in" svg:height="1.75in"/>
      <presentation:placeholder presentation:object="object" svg:x="5.8069in" svg:y="1.07986in" svg:width="6.61151in" svg:height="5.32986in"/>
      <presentation:placeholder presentation:object="outline" svg:x="0.9184in" svg:y="3in" svg:width="4.30035in" svg:height="3.42014in"/>
      <presentation:placeholder presentation:object="date-time" svg:x="0.86944in" svg:y="6.93574in" svg:width="3in" svg:height="0.39931in"/>
      <presentation:placeholder presentation:object="footer" svg:x="8.41667in" svg:y="6.93574in" svg:width="3.79498in" svg:height="0.39931in"/>
      <presentation:placeholder presentation:object="page-number" svg:x="12.21165in" svg:y="6.93574in" svg:width="0.57549in" svg:height="0.39931in"/>
    </style:presentation-page-layout>
    <style:presentation-page-layout style:name="Master1-PPL9" style:display-name="Picture with Caption">
      <presentation:placeholder presentation:object="title" svg:x="0.9184in" svg:y="1.07986in" svg:width="4.30035in" svg:height="1.75in"/>
      <presentation:placeholder presentation:object="graphic" svg:x="5.85517in" svg:y="1.07986in" svg:width="6.22758in" svg:height="5.32986in"/>
      <presentation:placeholder presentation:object="outline" svg:x="0.9184in" svg:y="3in" svg:width="4.30035in" svg:height="3.42014in"/>
      <presentation:placeholder presentation:object="date-time" svg:x="0.86944in" svg:y="6.93574in" svg:width="3in" svg:height="0.39931in"/>
      <presentation:placeholder presentation:object="footer" svg:x="8.41667in" svg:y="6.93574in" svg:width="3.79498in" svg:height="0.39931in"/>
      <presentation:placeholder presentation:object="page-number" svg:x="12.21165in" svg:y="6.93574in" svg:width="0.57549in" svg:height="0.39931in"/>
    </style:presentation-page-layout>
    <style:presentation-page-layout style:name="Master1-PPL10" style:display-name="Title and Vertical Text">
      <presentation:placeholder presentation:object="title" svg:x="0.88436in" svg:y="0.39931in" svg:width="11.32728in" svg:height="1.57311in"/>
      <presentation:placeholder presentation:object="outline" svg:x="0.88436in" svg:y="2.20833in" svg:width="11.32728in" svg:height="4.5in"/>
      <presentation:placeholder presentation:object="date-time" svg:x="0.86944in" svg:y="6.93574in" svg:width="3in" svg:height="0.39931in"/>
      <presentation:placeholder presentation:object="footer" svg:x="8.41667in" svg:y="6.93574in" svg:width="3.79498in" svg:height="0.39931in"/>
      <presentation:placeholder presentation:object="page-number" svg:x="12.21165in" svg:y="6.93574in" svg:width="0.57549in" svg:height="0.39931in"/>
    </style:presentation-page-layout>
    <style:presentation-page-layout style:name="Master1-PPL11" style:display-name="Vertical Title and Text">
      <presentation:placeholder presentation:object="title" svg:x="9.68276in" svg:y="0.68276in" svg:width="2.77558in" svg:height="6.02558in"/>
      <presentation:placeholder presentation:object="outline" svg:x="0.875in" svg:y="0.68276in" svg:width="8.54827in" svg:height="6.02558in"/>
      <presentation:placeholder presentation:object="date-time" svg:x="0.86944in" svg:y="6.93574in" svg:width="3in" svg:height="0.39931in"/>
      <presentation:placeholder presentation:object="footer" svg:x="8.41667in" svg:y="6.93574in" svg:width="3.79498in" svg:height="0.39931in"/>
      <presentation:placeholder presentation:object="page-number" svg:x="12.21165in" svg:y="6.93574in" svg:width="0.57549in" svg:height="0.39931in"/>
    </style:presentation-page-layout>
    <style:style style:family="graphic" style:name="Graphics"/>
    <style:default-style style:family="graphic">
      <style:graphic-properties draw:fill="solid" draw:fill-color="#fe8542" draw:opacity="100%" draw:stroke="solid" svg:stroke-width="0.01389in" svg:stroke-color="#6c3516" svg:stroke-opacity="100%" draw:stroke-linejoin="miter" svg:stroke-linecap="butt"/>
    </style:default-style>
    <draw:fill-image draw:name="a32" xlink:href="media/image2.svg" xlink:show="embed" xlink:actuate="onLoad"/>
    <draw:fill-image draw:name="a369" xlink:href="media/image2.svg" xlink:show="embed" xlink:actuate="onLoad"/>
    <draw:fill-image draw:name="a334" xlink:href="media/image2.svg" xlink:show="embed" xlink:actuate="onLoad"/>
    <draw:fill-image draw:name="a54" xlink:href="media/image2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30%" fo:text-align="left" style:tab-stop-distance="1in" fo:margin-left="1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3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3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30%" fo:text-align="left" style:tab-stop-distance="1in" fo:margin-left="1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30%" fo:text-align="left" style:tab-stop-distance="1in" fo:margin-left="1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0.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solid" draw:fill-color="#ffe7d9" draw:opacity="100%" draw:stroke="none" draw:shadow="visible" draw:shadow-offset-x="0.12767in" draw:shadow-offset-y="-0.12767in" draw:shadow-color="#000000" draw:shadow-opacity="100%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0">
      <style:graphic-properties draw:fill="bitmap" draw:fill-image-name="a369" style:repeat="repeat" draw:fill-image-width="0.195in" draw:fill-image-height="0.195in" draw:fill-image-ref-point="top-left" draw:stroke="none"/>
    </style:style>
    <style:style style:family="graphic" style:name="a371">
      <style:graphic-properties draw:fill="solid" draw:fill-color="#ec6d60" draw:opacity="100%" draw:stroke="none" draw:decorative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30%" fo:text-align="left" style:tab-stop-distance="1in" fo:margin-left="1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3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bitmap" draw:fill-image-name="a32" style:repeat="repeat" draw:fill-image-width="0.195in" draw:fill-image-height="0.195in" draw:fill-image-ref-point="top-left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solid" draw:fill-color="#ec6d60" draw:opacity="100%" draw:stroke="none" draw:decorative="true"/>
    </style:style>
    <style:style style:family="paragraph" style:name="a118">
      <style:paragraph-properties fo:line-height="13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5in" style:font-size-asian="0.5in" style:font-size-complex="0.5in" fo:letter-spacing="0.180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3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0">
      <style:paragraph-properties fo:line-height="130%" fo:text-align="left" style:tab-stop-distance="1in" fo:margin-left="1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30%" fo:text-align="left" style:tab-stop-distance="1in" fo:margin-left="1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3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draw:fill="bitmap" draw:fill-image-name="a54" style:repeat="repeat" draw:fill-image-width="0.195in" draw:fill-image-height="0.195in" draw:fill-image-ref-point="top-left" draw:stroke="none"/>
    </style:style>
    <style:style style:family="graphic" style:name="a56">
      <style:graphic-properties draw:fill="solid" draw:fill-color="#ec6d60" draw:opacity="100%" draw:stroke="none" draw:decorative="tru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43">
      <style:paragraph-properties fo:line-height="130%" fo:text-align="left" style:tab-stop-distance="1in" fo:margin-left="1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3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3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30%" fo:text-align="left" style:tab-stop-distance="1in" fo:margin-left="1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30%" fo:text-align="left" style:tab-stop-distance="1in" fo:margin-left="1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3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3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3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draw:fill="solid" draw:fill-color="#ffe7d9" draw:opacity="100%" draw:stroke="none" draw:shadow="visible" draw:shadow-offset-x="0.1442in" draw:shadow-offset-y="0.10866in" draw:shadow-color="#000000" draw:shadow-opacity="100%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5in" style:font-size-asian="0.5in" style:font-size-complex="0.5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draw:fill="bitmap" draw:fill-image-name="a334" style:repeat="repeat" draw:fill-image-width="0.195in" draw:fill-image-height="0.195in" draw:fill-image-ref-point="top-left" draw:stroke="none"/>
    </style:style>
    <style:style style:family="paragraph" style:name="a176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6">
      <style:graphic-properties draw:fill="solid" draw:fill-color="#ec6d60" draw:opacity="100%" draw:stroke="none" draw:decorative="true"/>
    </style:style>
    <style:style style:family="text" style:name="a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91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97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25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252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71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258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311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177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66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317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2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35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346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2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72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19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41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352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eniceBeachVTI" style:page-layout-name="pageLayout1" draw:style-name="a0">
      <draw:frame draw:id="id0" presentation:style-name="a3" draw:name="Title Placeholder 1" svg:x="0.88436in" svg:y="0.39931in" svg:width="11.32728in" svg:height="1.5731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88436in" svg:y="2.20833in" svg:width="11.32728in" svg:height="4.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86944in" svg:y="6.93574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6/15/2026</text:date></text:span><text:span text:style-name="a22" text:class-names=""/></text:p>
        </draw:text-box>
        <svg:title/>
        <svg:desc/>
      </draw:frame>
      <draw:frame draw:id="id3" presentation:style-name="a27" draw:name="Footer Placeholder 4" svg:x="8.41667in" svg:y="6.93574in" svg:width="3.79498in" svg:height="0.39931in" presentation:class="footer" presentation:placeholder="false">
        <draw:text-box>
          <text:p text:style-name="a26" text:class-names="" text:cond-style-name=""><text:span text:style-name="a25" text:class-names="">
 <text:s text:c="13"/></text:span></text:p>
        </draw:text-box>
        <svg:title/>
        <svg:desc/>
      </draw:frame>
      <draw:frame draw:id="id4" presentation:style-name="a31" draw:name="Slide Number Placeholder 5" svg:x="12.21165in" svg:y="6.93574in" svg:width="0.57549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draw:g draw:name="Group 6" draw:id="id5">
        <svg:title/>
        <svg:desc/>
        <draw:custom-shape svg:x="12.71443in" svg:y="3.88399in" svg:width="0.57549in" svg:height="3.20502in" draw:id="id6" draw:style-name="a33" draw:name="Freeform: Shape 7">
          <svg:title/>
          <svg:desc/>
          <draw:enhanced-geometry xmlns:dr3d="urn:oasis:names:tc:opendocument:xmlns:dr3d:1.0" draw:type="non-primitive" svg:viewBox="0 0 757287 3694096" draw:enhanced-path="M 757287 3694096 L 757287 0 0 0 0 368609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287"/>
            <draw:equation draw:name="f7" draw:formula="?f4 / 369409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3.10941in" svg:y="5.28947in" svg:width="0.22595in" svg:height="2.21053in" draw:id="id7" draw:style-name="a34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g>
    </style:master-page>
    <style:master-page style:name="Master1-Layout1-title-Title-Slide" style:page-layout-name="pageLayout1" draw:style-name="a35">
      <draw:frame draw:id="id8" presentation:style-name="a38" draw:name="Title 1" svg:x="1.75in" svg:y="1.38in" svg:width="8.35326in" svg:height="3.12in" presentation:class="title" presentation:placeholder="false">
        <draw:text-box>
          <text:p text:style-name="a37" text:class-names="" text:cond-style-name=""><text:span text:style-name="a36" text:class-names="">Click to edit Master title style</text:span></text:p>
        </draw:text-box>
        <svg:title/>
        <svg:desc/>
      </draw:frame>
      <draw:frame draw:id="id9" presentation:style-name="a41" draw:name="Subtitle 2" svg:x="1.75in" svg:y="5.12in" svg:width="8.35326in" svg:height="1.01629in" presentation:class="subtitle" presentation:placeholder="false">
        <draw:text-box>
          <text:p text:style-name="a40" text:class-names="" text:cond-style-name=""><text:span text:style-name="a39" text:class-names="">Click to edit Master subtitle style</text:span></text:p>
        </draw:text-box>
        <svg:title/>
        <svg:desc/>
      </draw:frame>
      <draw:frame draw:id="id10" presentation:style-name="a46" draw:name="Date Placeholder 3" svg:x="0.86944in" svg:y="6.93574in" svg:width="3in" svg:height="0.39931in" presentation:class="date-time" presentation:placeholder="false">
        <draw:text-box>
          <text:p text:style-name="a45" text:class-names="" text:cond-style-name=""><text:span text:style-name="a42" text:class-names=""><text:date text:fixed="false" style:data-style-name="a43">6/15/2026</text:date></text:span><text:span text:style-name="a44" text:class-names=""/></text:p>
        </draw:text-box>
        <svg:title/>
        <svg:desc/>
      </draw:frame>
      <draw:frame draw:id="id11" presentation:style-name="a49" draw:name="Footer Placeholder 4" svg:x="8.41667in" svg:y="6.93574in" svg:width="3.79498in" svg:height="0.39931in" presentation:class="footer" presentation:placeholder="false">
        <draw:text-box>
          <text:p text:style-name="a48" text:class-names="" text:cond-style-name=""><text:span text:style-name="a47" text:class-names="">
 <text:s text:c="13"/></text:span></text:p>
        </draw:text-box>
        <svg:title/>
        <svg:desc/>
      </draw:frame>
      <draw:frame draw:id="id12" presentation:style-name="a53" draw:name="Slide Number Placeholder 5" svg:x="12.21165in" svg:y="6.93574in" svg:width="0.57549in" svg:height="0.39931in" presentation:class="page-number" presentation:placeholder="false">
        <draw:text-box>
          <text:p text:style-name="a52" text:class-names="" text:cond-style-name=""><text:span text:style-name="a50" text:class-names=""><text:page-number style:num-format="1" text:fixed="false">‹#›</text:page-number></text:span><text:span text:style-name="a51" text:class-names=""/></text:p>
        </draw:text-box>
        <svg:title/>
        <svg:desc/>
      </draw:frame>
      <draw:g draw:name="Group 6" draw:id="id13">
        <svg:title/>
        <svg:desc/>
        <draw:custom-shape svg:x="0.04544in" svg:y="0.41099in" svg:width="0.57549in" svg:height="3.20502in" draw:id="id14" draw:style-name="a55" draw:name="Freeform: Shape 7">
          <svg:title/>
          <svg:desc/>
          <draw:enhanced-geometry xmlns:dr3d="urn:oasis:names:tc:opendocument:xmlns:dr3d:1.0" draw:type="non-primitive" svg:viewBox="0 0 757287 3694096" draw:enhanced-path="M 757287 3694096 L 757287 0 0 0 0 3686094 Z N" draw:text-areas="?f8 ?f10 ?f9 ?f1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287"/>
            <draw:equation draw:name="f7" draw:formula="?f4 / 369409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0in" svg:width="0.22595in" svg:height="2.21053in" draw:id="id15" draw:style-name="a56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 draw:mirror-vertical="true"/>
        </draw:custom-shape>
      </draw:g>
    </style:master-page>
    <style:master-page style:name="Master1-Layout2-obj-Title-and-Content" style:page-layout-name="pageLayout1" draw:style-name="a57">
      <draw:frame draw:id="id16" draw:layer="Master1-bg" presentation:style-name="a60" draw:name="Title 1" svg:x="0.88436in" svg:y="0.39931in" svg:width="11.32728in" svg:height="1.57311in" presentation:class="title" presentation:placeholder="false">
        <draw:text-box>
          <text:p text:style-name="a59" text:class-names="" text:cond-style-name=""><text:span text:style-name="a58" text:class-names="">Click to edit Master title style</text:span></text:p>
        </draw:text-box>
        <svg:title/>
        <svg:desc/>
      </draw:frame>
      <draw:frame draw:id="id17" presentation:style-name="a76" draw:name="Content Placeholder 2" svg:x="0.88436in" svg:y="2.20833in" svg:width="11.32728in" svg:height="4.5in" presentation:class="object" presentation:placeholder="false">
        <draw:text-box>
          <text:list text:style-name="a63">
            <text:list-item>
              <text:p text:style-name="a62" text:class-names="" text:cond-style-name=""><text:span text:style-name="a61" text:class-names="">Click to edit Master text styles</text:span></text:p>
            </text:list-item>
          </text:list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Second level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Third level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1" draw:name="Date Placeholder 3" svg:x="0.86944in" svg:y="6.93574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6/15/2026</text:date></text:span><text:span text:style-name="a79" text:class-names=""/></text:p>
        </draw:text-box>
        <svg:title/>
        <svg:desc/>
      </draw:frame>
      <draw:frame draw:id="id19" presentation:style-name="a84" draw:name="Footer Placeholder 4" svg:x="8.41667in" svg:y="6.93574in" svg:width="3.79498in" svg:height="0.39931in" presentation:class="footer" presentation:placeholder="false">
        <draw:text-box>
          <text:p text:style-name="a83" text:class-names="" text:cond-style-name=""><text:span text:style-name="a82" text:class-names="">
 <text:s text:c="13"/></text:span></text:p>
        </draw:text-box>
        <svg:title/>
        <svg:desc/>
      </draw:frame>
      <draw:frame draw:id="id20" presentation:style-name="a88" draw:name="Slide Number Placeholder 5" svg:x="12.21165in" svg:y="6.93574in" svg:width="0.57549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custom-shape svg:x="3.54657in" svg:y="0.55973in" svg:width="6.24019in" svg:height="6.24019in" draw:id="id21" draw:style-name="a90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2" presentation:style-name="a93" draw:name="Title 1" svg:x="3.9908in" svg:y="1.86979in" svg:width="5.35172in" svg:height="2.79297in" presentation:class="title" presentation:placeholder="false">
        <draw:text-box>
          <text:p text:style-name="a92" text:class-names="" text:cond-style-name=""><text:span text:style-name="a91" text:class-names="">Click to edit Master title style</text:span></text:p>
        </draw:text-box>
        <svg:title/>
        <svg:desc/>
      </draw:frame>
      <draw:frame draw:id="id23" presentation:style-name="a97" draw:name="Text Placeholder 2" svg:x="4.44253in" svg:y="4.96552in" svg:width="4.44828in" svg:height="1.26207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24" presentation:style-name="a102" draw:name="Date Placeholder 3" svg:x="0.86944in" svg:y="6.93574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6/15/2026</text:date></text:span><text:span text:style-name="a100" text:class-names=""/></text:p>
        </draw:text-box>
        <svg:title/>
        <svg:desc/>
      </draw:frame>
      <draw:frame draw:id="id25" presentation:style-name="a105" draw:name="Footer Placeholder 4" svg:x="8.41667in" svg:y="6.93574in" svg:width="3.79498in" svg:height="0.39931in" presentation:class="footer" presentation:placeholder="false">
        <draw:text-box>
          <text:p text:style-name="a104" text:class-names="" text:cond-style-name=""><text:span text:style-name="a103" text:class-names="">
 <text:s text:c="13"/></text:span></text:p>
        </draw:text-box>
        <svg:title/>
        <svg:desc/>
      </draw:frame>
      <draw:frame draw:id="id26" presentation:style-name="a109" draw:name="Slide Number Placeholder 5" svg:x="12.21165in" svg:y="6.93574in" svg:width="0.57549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7" draw:layer="Master1-bg" presentation:style-name="a113" draw:name="Title 1" svg:x="0.88436in" svg:y="0.39931in" svg:width="11.32728in" svg:height="1.57311in" presentation:class="title" presentation:placeholder="false">
        <draw:text-box>
          <text:p text:style-name="a112" text:class-names="" text:cond-style-name=""><text:span text:style-name="a111" text:class-names="">Click to edit Master title style</text:span></text:p>
        </draw:text-box>
        <svg:title/>
        <svg:desc/>
      </draw:frame>
      <draw:frame draw:id="id28" presentation:style-name="a129" draw:name="Content Placeholder 2" svg:x="0.88908in" svg:y="2.20833in" svg:width="5.46262in" svg:height="4.54688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Click to edit Master text styles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Second level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45" draw:name="Content Placeholder 3" svg:x="6.88289in" svg:y="2.20833in" svg:width="5.49864in" svg:height="4.54688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to edit Master text styles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50" draw:name="Date Placeholder 4" svg:x="0.86944in" svg:y="6.93574in" svg:width="3in" svg:height="0.39931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>6/15/2026</text:date></text:span><text:span text:style-name="a148" text:class-names=""/></text:p>
        </draw:text-box>
        <svg:title/>
        <svg:desc/>
      </draw:frame>
      <draw:frame draw:id="id31" presentation:style-name="a153" draw:name="Footer Placeholder 5" svg:x="8.41667in" svg:y="6.93574in" svg:width="3.79498in" svg:height="0.39931in" presentation:class="footer" presentation:placeholder="false">
        <draw:text-box>
          <text:p text:style-name="a152" text:class-names="" text:cond-style-name=""><text:span text:style-name="a151" text:class-names="">
 <text:s text:c="13"/></text:span></text:p>
        </draw:text-box>
        <svg:title/>
        <svg:desc/>
      </draw:frame>
      <draw:frame draw:id="id32" presentation:style-name="a157" draw:name="Slide Number Placeholder 6" svg:x="12.21165in" svg:y="6.93574in" svg:width="0.57549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>‹#›</text:page-number></text:span><text:span text:style-name="a155" text:class-names=""/></text:p>
        </draw:text-box>
        <svg:title/>
        <svg:desc/>
      </draw:frame>
    </style:master-page>
    <style:master-page style:name="Master1-Layout5-twoTxTwoObj-Comparison" style:page-layout-name="pageLayout1" draw:style-name="a158">
      <draw:frame draw:id="id33" draw:layer="Master1-bg" presentation:style-name="a161" draw:name="Title 1" svg:x="0.88742in" svg:y="0.40373in" svg:width="11.43781in" svg:height="1.5746in" presentation:class="title" presentation:placeholder="false">
        <draw:text-box>
          <text:p text:style-name="a160" text:class-names="" text:cond-style-name=""><text:span text:style-name="a159" text:class-names="">Click to edit Master title style</text:span></text:p>
        </draw:text-box>
        <svg:title/>
        <svg:desc/>
      </draw:frame>
      <draw:frame draw:id="id34" presentation:style-name="a165" draw:name="Text Placeholder 2" svg:x="0.875in" svg:y="2.0156in" svg:width="5.4767in" svg:height="0.72398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Click to edit Master text styles</text:span></text:p>
            </text:list-item>
          </text:list>
        </draw:text-box>
        <svg:title/>
        <svg:desc/>
      </draw:frame>
      <draw:frame draw:id="id35" presentation:style-name="a181" draw:name="Content Placeholder 3" svg:x="0.875in" svg:y="2.73958in" svg:width="5.4767in" svg:height="4.02951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cond level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85" draw:name="Text Placeholder 4" svg:x="6.86358in" svg:y="2.0156in" svg:width="5.46164in" svg:height="0.72398in" presentation:class="outline" presentation:placeholder="false">
        <draw:text-box>
          <text:list text:style-name="a184">
            <text:list-item>
              <text:p text:style-name="a183" text:class-names="" text:cond-style-name=""><text:span text:style-name="a182" text:class-names="">Click to edit Master text styles</text:span></text:p>
            </text:list-item>
          </text:list>
        </draw:text-box>
        <svg:title/>
        <svg:desc/>
      </draw:frame>
      <draw:frame draw:id="id37" presentation:style-name="a201" draw:name="Content Placeholder 5" svg:x="6.86358in" svg:y="2.73958in" svg:width="5.46164in" svg:height="4.02951in" presentation:class="object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Second level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Third level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list text:style-name="a200">
                            <text:list-item>
                              <text:p text:style-name="a199" text:class-names="" text:cond-style-name=""><text:span text:style-name="a1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06" draw:name="Date Placeholder 6" svg:x="0.86944in" svg:y="6.93574in" svg:width="3in" svg:height="0.39931in" presentation:class="date-time" presentation:placeholder="false">
        <draw:text-box>
          <text:p text:style-name="a205" text:class-names="" text:cond-style-name=""><text:span text:style-name="a202" text:class-names=""><text:date text:fixed="false" style:data-style-name="a203">6/15/2026</text:date></text:span><text:span text:style-name="a204" text:class-names=""/></text:p>
        </draw:text-box>
        <svg:title/>
        <svg:desc/>
      </draw:frame>
      <draw:frame draw:id="id39" presentation:style-name="a209" draw:name="Footer Placeholder 7" svg:x="8.41667in" svg:y="6.93574in" svg:width="3.79498in" svg:height="0.39931in" presentation:class="footer" presentation:placeholder="false">
        <draw:text-box>
          <text:p text:style-name="a208" text:class-names="" text:cond-style-name=""><text:span text:style-name="a207" text:class-names="">
 <text:s text:c="13"/></text:span></text:p>
        </draw:text-box>
        <svg:title/>
        <svg:desc/>
      </draw:frame>
      <draw:frame draw:id="id40" presentation:style-name="a213" draw:name="Slide Number Placeholder 8" svg:x="12.21165in" svg:y="6.93574in" svg:width="0.57549in" svg:height="0.39931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>‹#›</text:page-number></text:span><text:span text:style-name="a211" text:class-names=""/></text:p>
        </draw:text-box>
        <svg:title/>
        <svg:desc/>
      </draw:frame>
    </style:master-page>
    <style:master-page style:name="Master1-Layout6-titleOnly-Title-Only" style:page-layout-name="pageLayout1" draw:style-name="a214">
      <draw:frame draw:id="id41" presentation:style-name="a217" draw:name="Title 1" svg:x="0.875in" svg:y="1.07586in" svg:width="11.03977in" svg:height="1.29109in" presentation:class="title" presentation:placeholder="false">
        <draw:text-box>
          <text:p text:style-name="a216" text:class-names="" text:cond-style-name=""><text:span text:style-name="a215" text:class-names="">Click to edit Master title style</text:span></text:p>
        </draw:text-box>
        <svg:title/>
        <svg:desc/>
      </draw:frame>
      <draw:frame draw:id="id42" presentation:style-name="a222" draw:name="Date Placeholder 2" svg:x="0.86944in" svg:y="6.93574in" svg:width="3in" svg:height="0.39931in" presentation:class="date-time" presentation:placeholder="false">
        <draw:text-box>
          <text:p text:style-name="a221" text:class-names="" text:cond-style-name=""><text:span text:style-name="a218" text:class-names=""><text:date text:fixed="false" style:data-style-name="a219">6/15/2026</text:date></text:span><text:span text:style-name="a220" text:class-names=""/></text:p>
        </draw:text-box>
        <svg:title/>
        <svg:desc/>
      </draw:frame>
      <draw:frame draw:id="id43" presentation:style-name="a225" draw:name="Footer Placeholder 3" svg:x="8.41667in" svg:y="6.93574in" svg:width="3.79498in" svg:height="0.39931in" presentation:class="footer" presentation:placeholder="false">
        <draw:text-box>
          <text:p text:style-name="a224" text:class-names="" text:cond-style-name=""><text:span text:style-name="a223" text:class-names="">
 <text:s text:c="13"/></text:span></text:p>
        </draw:text-box>
        <svg:title/>
        <svg:desc/>
      </draw:frame>
      <draw:frame draw:id="id44" presentation:style-name="a229" draw:name="Slide Number Placeholder 4" svg:x="12.21165in" svg:y="6.93574in" svg:width="0.57549in" svg:height="0.39931in" presentation:class="page-number" presentation:placeholder="false">
        <draw:text-box>
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</draw:text-box>
        <svg:title/>
        <svg:desc/>
      </draw:frame>
    </style:master-page>
    <style:master-page style:name="Master1-Layout7-blank-Blank" style:page-layout-name="pageLayout1" draw:style-name="a230">
      <draw:frame draw:id="id45" presentation:style-name="a235" draw:name="Date Placeholder 1" svg:x="0.86944in" svg:y="6.93574in" svg:width="3in" svg:height="0.39931in" presentation:class="date-time" presentation:placeholder="false">
        <draw:text-box>
          <text:p text:style-name="a234" text:class-names="" text:cond-style-name=""><text:span text:style-name="a231" text:class-names=""><text:date text:fixed="false" style:data-style-name="a232">6/15/2026</text:date></text:span><text:span text:style-name="a233" text:class-names=""/></text:p>
        </draw:text-box>
        <svg:title/>
        <svg:desc/>
      </draw:frame>
      <draw:frame draw:id="id46" presentation:style-name="a238" draw:name="Footer Placeholder 2" svg:x="8.41667in" svg:y="6.93574in" svg:width="3.79498in" svg:height="0.39931in" presentation:class="footer" presentation:placeholder="false">
        <draw:text-box>
          <text:p text:style-name="a237" text:class-names="" text:cond-style-name=""><text:span text:style-name="a236" text:class-names="">
 <text:s text:c="13"/></text:span></text:p>
        </draw:text-box>
        <svg:title/>
        <svg:desc/>
      </draw:frame>
      <draw:frame draw:id="id47" presentation:style-name="a242" draw:name="Slide Number Placeholder 3" svg:x="12.21165in" svg:y="6.93574in" svg:width="0.57549in" svg:height="0.39931in" presentation:class="page-number" presentation:placeholder="false">
        <draw:text-box>
          <text:p text:style-name="a241" text:class-names="" text:cond-style-name=""><text:span text:style-name="a239" text:class-names=""><text:page-number style:num-format="1" text:fixed="false">‹#›</text:page-number></text:span><text:span text:style-name="a240" text:class-names=""/></text:p>
        </draw:text-box>
        <svg:title/>
        <svg:desc/>
      </draw:frame>
    </style:master-page>
    <style:master-page style:name="Master1-Layout8-objTx-Content-with-Caption" style:page-layout-name="pageLayout1" draw:style-name="a243">
      <draw:frame draw:id="id48" draw:layer="Master1-bg" presentation:style-name="a246" draw:name="Title 1" svg:x="0.9184in" svg:y="1.07986in" svg:width="4.30035in" svg:height="1.75in" presentation:class="title" presentation:placeholder="false">
        <draw:text-box>
          <text:p text:style-name="a245" text:class-names="" text:cond-style-name=""><text:span text:style-name="a244" text:class-names="">Click to edit Master title style</text:span></text:p>
        </draw:text-box>
        <svg:title/>
        <svg:desc/>
      </draw:frame>
      <draw:frame draw:id="id49" presentation:style-name="a262" draw:name="Content Placeholder 2" svg:x="5.8069in" svg:y="1.07986in" svg:width="6.61151in" svg:height="5.32986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66" draw:name="Text Placeholder 3" svg:x="0.9184in" svg:y="3in" svg:width="4.30035in" svg:height="3.42014in" presentation:class="outline" presentation:placeholder="false">
        <draw:text-box>
          <text:list text:style-name="a265">
            <text:list-item>
              <text:p text:style-name="a264" text:class-names="" text:cond-style-name=""><text:span text:style-name="a263" text:class-names="">Click to edit Master text styles</text:span></text:p>
            </text:list-item>
          </text:list>
        </draw:text-box>
        <svg:title/>
        <svg:desc/>
      </draw:frame>
      <draw:frame draw:id="id51" presentation:style-name="a271" draw:name="Date Placeholder 4" svg:x="0.86944in" svg:y="6.93574in" svg:width="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6/15/2026</text:date></text:span><text:span text:style-name="a269" text:class-names=""/></text:p>
        </draw:text-box>
        <svg:title/>
        <svg:desc/>
      </draw:frame>
      <draw:frame draw:id="id52" presentation:style-name="a274" draw:name="Footer Placeholder 5" svg:x="8.41667in" svg:y="6.93574in" svg:width="3.79498in" svg:height="0.39931in" presentation:class="footer" presentation:placeholder="false">
        <draw:text-box>
          <text:p text:style-name="a273" text:class-names="" text:cond-style-name=""><text:span text:style-name="a272" text:class-names="">
 <text:s text:c="13"/></text:span></text:p>
        </draw:text-box>
        <svg:title/>
        <svg:desc/>
      </draw:frame>
      <draw:frame draw:id="id53" presentation:style-name="a278" draw:name="Slide Number Placeholder 6" svg:x="12.21165in" svg:y="6.93574in" svg:width="0.57549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9">
      <draw:frame draw:id="id54" draw:layer="Master1-bg" presentation:style-name="a282" draw:name="Title 1" svg:x="0.9184in" svg:y="1.07986in" svg:width="4.30035in" svg:height="1.75in" presentation:class="title" presentation:placeholder="false">
        <draw:text-box>
          <text:p text:style-name="a281" text:class-names="" text:cond-style-name=""><text:span text:style-name="a280" text:class-names="">Click to edit Master title style</text:span></text:p>
        </draw:text-box>
        <svg:title/>
        <svg:desc/>
      </draw:frame>
      <draw:frame draw:id="id55" presentation:style-name="a285" draw:name="Picture Placeholder 2" svg:x="5.85517in" svg:y="1.07986in" svg:width="6.22758in" svg:height="5.32986in" presentation:class="graphic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56" presentation:style-name="a289" draw:name="Text Placeholder 3" svg:x="0.9184in" svg:y="3in" svg:width="4.30035in" svg:height="3.42014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ck to edit Master text styles</text:span></text:p>
            </text:list-item>
          </text:list>
        </draw:text-box>
        <svg:title/>
        <svg:desc/>
      </draw:frame>
      <draw:frame draw:id="id57" presentation:style-name="a294" draw:name="Date Placeholder 4" svg:x="0.86944in" svg:y="6.93574in" svg:width="3in" svg:height="0.39931in" presentation:class="date-time" presentation:placeholder="false">
        <draw:text-box>
          <text:p text:style-name="a293" text:class-names="" text:cond-style-name=""><text:span text:style-name="a290" text:class-names=""><text:date text:fixed="false" style:data-style-name="a291">6/15/2026</text:date></text:span><text:span text:style-name="a292" text:class-names=""/></text:p>
        </draw:text-box>
        <svg:title/>
        <svg:desc/>
      </draw:frame>
      <draw:frame draw:id="id58" presentation:style-name="a297" draw:name="Footer Placeholder 5" svg:x="8.41667in" svg:y="6.93574in" svg:width="3.79498in" svg:height="0.39931in" presentation:class="footer" presentation:placeholder="false">
        <draw:text-box>
          <text:p text:style-name="a296" text:class-names="" text:cond-style-name=""><text:span text:style-name="a295" text:class-names="">
 <text:s text:c="13"/></text:span></text:p>
        </draw:text-box>
        <svg:title/>
        <svg:desc/>
      </draw:frame>
      <draw:frame draw:id="id59" presentation:style-name="a301" draw:name="Slide Number Placeholder 6" svg:x="12.21165in" svg:y="6.93574in" svg:width="0.57549in" svg:height="0.39931in" presentation:class="page-number" presentation:placeholder="false">
        <draw:text-box>
          <text:p text:style-name="a300" text:class-names="" text:cond-style-name=""><text:span text:style-name="a298" text:class-names=""><text:page-number style:num-format="1" text:fixed="false">‹#›</text:page-number></text:span><text:span text:style-name="a29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02">
      <draw:frame draw:id="id60" presentation:style-name="a305" draw:name="Title 1" svg:x="0.88436in" svg:y="0.39931in" svg:width="11.32728in" svg:height="1.57311in" presentation:class="title" presentation:placeholder="false">
        <draw:text-box>
          <text:p text:style-name="a304" text:class-names="" text:cond-style-name=""><text:span text:style-name="a303" text:class-names="">Click to edit Master title style</text:span></text:p>
        </draw:text-box>
        <svg:title/>
        <svg:desc/>
      </draw:frame>
      <draw:frame draw:id="id61" presentation:style-name="a321" draw:name="Vertical Text Placeholder 2" svg:x="0.88436in" svg:y="2.20833in" svg:width="11.32728in" svg:height="4.5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ck to edit Master text styles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Second level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Third level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26" draw:name="Date Placeholder 3" svg:x="0.86944in" svg:y="6.93574in" svg:width="3in" svg:height="0.39931in" presentation:class="date-time" presentation:placeholder="false">
        <draw:text-box>
          <text:p text:style-name="a325" text:class-names="" text:cond-style-name=""><text:span text:style-name="a322" text:class-names=""><text:date text:fixed="false" style:data-style-name="a323">6/15/2026</text:date></text:span><text:span text:style-name="a324" text:class-names=""/></text:p>
        </draw:text-box>
        <svg:title/>
        <svg:desc/>
      </draw:frame>
      <draw:frame draw:id="id63" presentation:style-name="a329" draw:name="Footer Placeholder 4" svg:x="8.41667in" svg:y="6.93574in" svg:width="3.79498in" svg:height="0.39931in" presentation:class="footer" presentation:placeholder="false">
        <draw:text-box>
          <text:p text:style-name="a328" text:class-names="" text:cond-style-name=""><text:span text:style-name="a327" text:class-names="">
 <text:s text:c="13"/></text:span></text:p>
        </draw:text-box>
        <svg:title/>
        <svg:desc/>
      </draw:frame>
      <draw:frame draw:id="id64" presentation:style-name="a333" draw:name="Slide Number Placeholder 5" svg:x="12.21165in" svg:y="6.93574in" svg:width="0.57549in" svg:height="0.39931in" presentation:class="page-number" presentation:placeholder="false">
        <draw:text-box>
          <text:p text:style-name="a332" text:class-names="" text:cond-style-name=""><text:span text:style-name="a330" text:class-names=""><text:page-number style:num-format="1" text:fixed="false">‹#›</text:page-number></text:span><text:span text:style-name="a331" text:class-names=""/></text:p>
        </draw:text-box>
        <svg:title/>
        <svg:desc/>
      </draw:frame>
      <draw:g draw:name="Group 6" draw:id="id65">
        <svg:title/>
        <svg:desc/>
        <draw:custom-shape svg:x="0.04544in" svg:y="3.88399in" svg:width="0.57549in" svg:height="3.20502in" draw:id="id66" draw:style-name="a335" draw:name="Freeform: Shape 7">
          <svg:title/>
          <svg:desc/>
          <draw:enhanced-geometry xmlns:dr3d="urn:oasis:names:tc:opendocument:xmlns:dr3d:1.0" draw:type="non-primitive" svg:viewBox="0 0 757287 3694096" draw:enhanced-path="M 757287 3694096 L 757287 0 0 0 0 3686094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287"/>
            <draw:equation draw:name="f7" draw:formula="?f4 / 369409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5.28947in" svg:width="0.22595in" svg:height="2.21053in" draw:id="id67" draw:style-name="a336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</style:master-page>
    <style:master-page style:name="Master1-Layout11-vertTitleAndTx-Vertical-Title-and-Text" style:page-layout-name="pageLayout1" draw:style-name="a337">
      <draw:frame draw:id="id68" presentation:style-name="a340" draw:name="Vertical Title 1" svg:x="9.68276in" svg:y="0.68276in" svg:width="2.77558in" svg:height="6.02558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69" presentation:style-name="a356" draw:name="Vertical Text Placeholder 2" svg:x="0.875in" svg:y="0.68276in" svg:width="8.54827in" svg:height="6.02558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cond le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hird le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61" draw:name="Date Placeholder 3" svg:x="0.86944in" svg:y="6.93574in" svg:width="3in" svg:height="0.39931in" presentation:class="date-time" presentation:placeholder="false">
        <draw:text-box>
          <text:p text:style-name="a360" text:class-names="" text:cond-style-name=""><text:span text:style-name="a357" text:class-names=""><text:date text:fixed="false" style:data-style-name="a358">6/15/2026</text:date></text:span><text:span text:style-name="a359" text:class-names=""/></text:p>
        </draw:text-box>
        <svg:title/>
        <svg:desc/>
      </draw:frame>
      <draw:frame draw:id="id71" presentation:style-name="a364" draw:name="Footer Placeholder 4" svg:x="8.41667in" svg:y="6.93574in" svg:width="3.79498in" svg:height="0.39931in" presentation:class="footer" presentation:placeholder="false">
        <draw:text-box>
          <text:p text:style-name="a363" text:class-names="" text:cond-style-name=""><text:span text:style-name="a362" text:class-names="">
 <text:s text:c="13"/></text:span></text:p>
        </draw:text-box>
        <svg:title/>
        <svg:desc/>
      </draw:frame>
      <draw:frame draw:id="id72" presentation:style-name="a368" draw:name="Slide Number Placeholder 5" svg:x="12.21165in" svg:y="6.93574in" svg:width="0.57549in" svg:height="0.39931in" presentation:class="page-number" presentation:placeholder="false">
        <draw:text-box>
          <text:p text:style-name="a367" text:class-names="" text:cond-style-name=""><text:span text:style-name="a365" text:class-names=""><text:page-number style:num-format="1" text:fixed="false">‹#›</text:page-number></text:span><text:span text:style-name="a366" text:class-names=""/></text:p>
        </draw:text-box>
        <svg:title/>
        <svg:desc/>
      </draw:frame>
      <draw:g draw:name="Group 6" draw:id="id73">
        <svg:title/>
        <svg:desc/>
        <draw:custom-shape svg:x="0.04544in" svg:y="3.88399in" svg:width="0.57549in" svg:height="3.20502in" draw:id="id74" draw:style-name="a370" draw:name="Freeform: Shape 7">
          <svg:title/>
          <svg:desc/>
          <draw:enhanced-geometry xmlns:dr3d="urn:oasis:names:tc:opendocument:xmlns:dr3d:1.0" draw:type="non-primitive" svg:viewBox="0 0 757287 3694096" draw:enhanced-path="M 757287 3694096 L 757287 0 0 0 0 3686094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287"/>
            <draw:equation draw:name="f7" draw:formula="?f4 / 369409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5.28947in" svg:width="0.22595in" svg:height="2.21053in" draw:id="id75" draw:style-name="a371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meta:creation-date>2026-06-13T12:02:38Z</meta:creation-date>
    <dc:date>2026-06-15T12:30:14Z</dc:date>
    <meta:editing-cycles>10</meta:editing-cycles>
  </office:meta>
</office:document-meta>
</file>